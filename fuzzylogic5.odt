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10C51E2EF89B623B70F.png" manifest:media-type="image/png"/>
  <manifest:file-entry manifest:full-path="Pictures/1000000100000294000002FB9A7EDAAAD739F58C.png" manifest:media-type="image/png"/>
  <manifest:file-entry manifest:full-path="Pictures/10000001000004A2000001C3B32434FE952D6AB4.png" manifest:media-type="image/png"/>
  <manifest:file-entry manifest:full-path="Pictures/1000000100000294000002C9E906B63D01284AC7.png" manifest:media-type="image/png"/>
  <manifest:file-entry manifest:full-path="Pictures/1000000100000294000002AD586BF29A514604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848" officeooo:paragraph-rsid="000d8848"/>
    </style:style>
    <style:style style:name="P2" style:family="paragraph" style:parent-style-name="Standard">
      <style:text-properties fo:font-size="13pt" fo:font-weight="bold" officeooo:rsid="000d8848" officeooo:paragraph-rsid="000d8848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e5c38" officeooo:paragraph-rsid="000e5c38" style:font-size-asian="11.3500003814697pt" style:font-weight-asian="bold" style:font-size-complex="13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- <text:s/>Md Ishrar</text:p>
      <text:p text:style-name="P1">Course - AIML </text:p>
      <text:p text:style-name="P1">Enrollment Number – 12019051623</text:p>
      <text:p text:style-name="P1"/>
      <text:p text:style-name="P1"/>
      <text:p text:style-name="P1"><text:tab/><text:tab/> <text:s text:c="32"/><text:span text:style-name="T1">Lab – 5</text:span></text:p>
      <text:p text:style-name="P1"><text:span text:style-name="T1"/></text:p>
      <text:p text:style-name="P2">Code <text:span text:style-name="T2">-</text:span></text:p>
      <text:p text:style-name="P2"><text:span text:style-name="T2"/></text:p>
      <text:p text:style-name="P2"><text:span text:style-name="T2">%% Fuzzy SVM - Full Single File Implementation</text:span></text:p>
      <text:p text:style-name="P2"><text:span text:style-name="T2">% Save as: fuzzySVM_main.m</text:span></text:p>
      <text:p text:style-name="P2"><text:span text:style-name="T2"/></text:p>
      <text:p text:style-name="P2"><text:span text:style-name="T2">clc; clear; close all;</text:span></text:p>
      <text:p text:style-name="P2"><text:span text:style-name="T2"/></text:p>
      <text:p text:style-name="P2"><text:span text:style-name="T2">%% 1. Load and Prepare Data</text:span></text:p>
      <text:p text:style-name="P2"><text:span text:style-name="T2">load fisheriris</text:span></text:p>
      <text:p text:style-name="P2"><text:span text:style-name="T2">X = meas(:, 1:2);</text:span></text:p>
      <text:p text:style-name="P2"><text:span text:style-name="T2">y = grp2idx(species);</text:span></text:p>
      <text:p text:style-name="P2"><text:span text:style-name="T2"/></text:p>
      <text:p text:style-name="P2"><text:span text:style-name="T2">% Keep only 2 classes for binary classification</text:span></text:p>
      <text:p text:style-name="P2"><text:span text:style-name="T2">idx = y &lt;= 2;</text:span></text:p>
      <text:p text:style-name="P2"><text:span text:style-name="T2">X = X(idx, :);</text:span></text:p>
      <text:p text:style-name="P2"><text:span text:style-name="T2">y = y(idx);</text:span></text:p>
      <text:p text:style-name="P2"><text:span text:style-name="T2">y(y == 1) = -1;</text:span></text:p>
      <text:p text:style-name="P2"><text:span text:style-name="T2">y(y == 2) = <text:s/>1;</text:span></text:p>
      <text:p text:style-name="P2"><text:span text:style-name="T2"/></text:p>
      <text:p text:style-name="P2"><text:span text:style-name="T2">fprintf('Dataset: %d samples, %d features\n', size(X,1), size(X,2));</text:span></text:p>
      <text:p text:style-name="P2"><text:span text:style-name="T2">fprintf('Class -1: %d samples | Class +1: %d samples\n', sum(y==-1), sum(y==1));</text:span></text:p>
      <text:p text:style-name="P2"><text:span text:style-name="T2"/></text:p>
      <text:p text:style-name="P2"><text:span text:style-name="T2">%% 2. Compute Fuzzy Memberships</text:span></text:p>
      <text:p text:style-name="P2"><text:span text:style-name="T2">classes = unique(y);</text:span></text:p>
      <text:p text:style-name="P2"><text:span text:style-name="T2">s = zeros(size(y));</text:span></text:p>
      <text:p text:style-name="P2"><text:span text:style-name="T2">delta = 0.1;</text:span></text:p>
      <text:p text:style-name="P2"><text:span text:style-name="T2"/></text:p>
      <text:p text:style-name="P2"><text:span text:style-name="T2">for c = 1:length(classes)</text:span></text:p>
      <text:p text:style-name="P2"><text:span text:style-name="T2"><text:s text:c="4"/>idx_c <text:s/>= y == classes(c);</text:span></text:p>
      <text:p text:style-name="P2"><text:span text:style-name="T2"><text:s text:c="4"/>Xc <text:s text:c="4"/>= X(idx_c, :);</text:span></text:p>
      <text:p text:style-name="P2"><text:span text:style-name="T2"><text:s text:c="4"/>center = mean(Xc, 1);</text:span></text:p>
      <text:p text:style-name="P2"><text:span text:style-name="T2"><text:s text:c="4"/>dists <text:s/>= sqrt(sum((Xc - center).^2, 2));</text:span></text:p>
      <text:p text:style-name="P2"><text:span text:style-name="T2"><text:s text:c="4"/>r <text:s text:c="5"/>= max(dists);</text:span></text:p>
      <text:p text:style-name="P2"><text:span text:style-name="T2"><text:s text:c="4"/>s(idx_c) = 1 - dists / (r + delta);</text:span></text:p>
      <text:p text:style-name="P2"><text:span text:style-name="T2">end</text:span></text:p>
      <text:p text:style-name="P2"><text:span text:style-name="T2"/></text:p>
      <text:p text:style-name="P2"><text:span text:style-name="T2">s = max(s, delta);</text:span></text:p>
      <text:p text:style-name="P2"><text:span text:style-name="T2">s = min(s, 1.0);</text:span></text:p>
      <text:p text:style-name="P2"><text:span text:style-name="T2"/></text:p>
      <text:p text:style-name="P2"><text:soft-page-break/><text:span text:style-name="T2">fprintf('\nMembership Stats:\n');</text:span></text:p>
      <text:p text:style-name="P2"><text:span text:style-name="T2">fprintf(' <text:s/>Min: %.4f | Max: %.4f | Mean: %.4f\n', min(s), max(s), mean(s));</text:span></text:p>
      <text:p text:style-name="P2"><text:span text:style-name="T2"/></text:p>
      <text:p text:style-name="P2"><text:span text:style-name="T2">%% 3. Train Fuzzy SVM</text:span></text:p>
      <text:p text:style-name="P2"><text:span text:style-name="T2">C = 1.0;</text:span></text:p>
      <text:p text:style-name="P2"><text:span text:style-name="T2"/></text:p>
      <text:p text:style-name="P2"><text:span text:style-name="T2">model = fitcsvm(X, y, ...</text:span></text:p>
      <text:p text:style-name="P2"><text:span text:style-name="T2"><text:s text:c="4"/>'KernelFunction', 'rbf', ...</text:span></text:p>
      <text:p text:style-name="P2"><text:span text:style-name="T2"><text:s text:c="4"/>'BoxConstraint', <text:s/>C, ...</text:span></text:p>
      <text:p text:style-name="P2"><text:span text:style-name="T2"><text:s text:c="4"/>'Weights', <text:s text:c="7"/>s, ...</text:span></text:p>
      <text:p text:style-name="P2"><text:span text:style-name="T2"><text:s text:c="4"/>'Standardize', <text:s text:c="3"/>true, ...</text:span></text:p>
      <text:p text:style-name="P2"><text:span text:style-name="T2"><text:s text:c="4"/>'KernelScale', <text:s text:c="3"/>'auto');</text:span></text:p>
      <text:p text:style-name="P2"><text:span text:style-name="T2"/></text:p>
      <text:p text:style-name="P2"><text:span text:style-name="T2">%% 4. Evaluate Model</text:span></text:p>
      <text:p text:style-name="P2"><text:span text:style-name="T2">yPred = predict(model, X);</text:span></text:p>
      <text:p text:style-name="P2"><text:span text:style-name="T2">acc <text:s text:c="2"/>= sum(yPred == y) / numel(y) * 100;</text:span></text:p>
      <text:p text:style-name="P2"><text:span text:style-name="T2"/></text:p>
      <text:p text:style-name="P2"><text:span text:style-name="T2">fprintf('\n--- Results ---\n');</text:span></text:p>
      <text:p text:style-name="P2"><text:span text:style-name="T2">fprintf('Accuracy : %.2f%%\n', acc);</text:span></text:p>
      <text:p text:style-name="P2"><text:span text:style-name="T2">fprintf('Support Vectors: %d\n', size(model.SupportVectors, 1));</text:span></text:p>
      <text:p text:style-name="P2"><text:span text:style-name="T2"/></text:p>
      <text:p text:style-name="P2"><text:span text:style-name="T2">cm = confusionmat(y, yPred);</text:span></text:p>
      <text:p text:style-name="P2"><text:span text:style-name="T2">fprintf('\nConfusion Matrix:\n');</text:span></text:p>
      <text:p text:style-name="P2"><text:span text:style-name="T2">fprintf(' <text:s text:c="10"/>Pred -1 <text:s text:c="2"/>Pred +1\n');</text:span></text:p>
      <text:p text:style-name="P2"><text:span text:style-name="T2">fprintf('Actual -1 <text:s/>%5d <text:s text:c="4"/>%5d\n', cm(1,1), cm(1,2));</text:span></text:p>
      <text:p text:style-name="P2"><text:span text:style-name="T2">fprintf('Actual +1 <text:s/>%5d <text:s text:c="4"/>%5d\n', cm(2,1), cm(2,2));</text:span></text:p>
      <text:p text:style-name="P2"><text:span text:style-name="T2"/></text:p>
      <text:p text:style-name="P2"><text:span text:style-name="T2">%% 5. Visualize: Membership Values</text:span></text:p>
      <text:p text:style-name="P2"><text:span text:style-name="T2">figure('Name', 'Fuzzy SVM Results', 'Position', [100 100 1200 450]);</text:span></text:p>
      <text:p text:style-name="P2"><text:span text:style-name="T2"/></text:p>
      <text:p text:style-name="P2"><text:span text:style-name="T2">subplot(1, 3, 1);</text:span></text:p>
      <text:p text:style-name="P2"><text:span text:style-name="T2">gscatter(X(:,1), X(:,2), y, 'rb', 'ox', 8);</text:span></text:p>
      <text:p text:style-name="P2"><text:span text:style-name="T2">hold on;</text:span></text:p>
      <text:p text:style-name="P2"><text:span text:style-name="T2">scatter(X(:,1), X(:,2), 60, s, 'filled', 'MarkerEdgeColor', 'k', 'LineWidth', 0.5);</text:span></text:p>
      <text:p text:style-name="P2"><text:span text:style-name="T2">colorbar;</text:span></text:p>
      <text:p text:style-name="P2"><text:span text:style-name="T2">colormap(gca, 'parula');</text:span></text:p>
      <text:p text:style-name="P2"><text:span text:style-name="T2">title('Fuzzy Memberships (color = s value)');</text:span></text:p>
      <text:p text:style-name="P2"><text:span text:style-name="T2">xlabel('Feature 1'); ylabel('Feature 2');</text:span></text:p>
      <text:p text:style-name="P2"><text:span text:style-name="T2">legend('Class -1', 'Class +1', 'Location', 'best');</text:span></text:p>
      <text:p text:style-name="P2"><text:span text:style-name="T2">grid on;</text:span></text:p>
      <text:p text:style-name="P2"><text:span text:style-name="T2"/></text:p>
      <text:p text:style-name="P2"><text:span text:style-name="T2">%% 6. Visualize: Decision Boundary</text:span></text:p>
      <text:p text:style-name="P2"><text:span text:style-name="T2">subplot(1, 3, 2);</text:span></text:p>
      <text:p text:style-name="P2"><text:span text:style-name="T2"/></text:p>
      <text:p text:style-name="P2"><text:span text:style-name="T2">x1range = linspace(min(X(:,1)) - 0.5, max(X(:,1)) + 0.5, 300);</text:span></text:p>
      <text:p text:style-name="P2"><text:span text:style-name="T2">x2range = linspace(min(X(:,2)) - 0.5, max(X(:,2)) + 0.5, 300);</text:span></text:p>
      <text:p text:style-name="P2"><text:span text:style-name="T2">[xx1, xx2] = meshgrid(x1range, x2range);</text:span></text:p>
      <text:p text:style-name="P2"><text:span text:style-name="T2">XGrid = [xx1(:), xx2(:)];</text:span></text:p>
      <text:p text:style-name="P2"><text:soft-page-break/><text:span text:style-name="T2"/></text:p>
      <text:p text:style-name="P2"><text:span text:style-name="T2">[~, scores] = predict(model, XGrid);</text:span></text:p>
      <text:p text:style-name="P2"><text:span text:style-name="T2">scoreGrid <text:s text:c="2"/>= reshape(scores(:, 2), size(xx1));</text:span></text:p>
      <text:p text:style-name="P2"><text:span text:style-name="T2"/></text:p>
      <text:p text:style-name="P2"><text:span text:style-name="T2">contourf(xx1, xx2, scoreGrid, 50, 'LineStyle', 'none');</text:span></text:p>
      <text:p text:style-name="P2"><text:span text:style-name="T2">colormap(gca, 'jet'); colorbar;</text:span></text:p>
      <text:p text:style-name="P2"><text:span text:style-name="T2">hold on;</text:span></text:p>
      <text:p text:style-name="P2"><text:span text:style-name="T2">contour(xx1, xx2, scoreGrid, [0 0], 'k-', 'LineWidth', 2);</text:span></text:p>
      <text:p text:style-name="P2"><text:span text:style-name="T2">gscatter(X(:,1), X(:,2), y, 'rb', 'ox', 8);</text:span></text:p>
      <text:p text:style-name="P2"><text:span text:style-name="T2"/></text:p>
      <text:p text:style-name="P2"><text:span text:style-name="T2">sv = model.SupportVectors;</text:span></text:p>
      <text:p text:style-name="P2"><text:span text:style-name="T2">if ~isempty(model.Mu)</text:span></text:p>
      <text:p text:style-name="P2"><text:span text:style-name="T2"><text:s text:c="4"/>sv = sv .* model.Sigma + model.Mu;</text:span></text:p>
      <text:p text:style-name="P2"><text:span text:style-name="T2">end</text:span></text:p>
      <text:p text:style-name="P2"><text:span text:style-name="T2">scatter(sv(:,1), sv(:,2), 100, 'k', 'square', 'LineWidth', 2);</text:span></text:p>
      <text:p text:style-name="P2"><text:span text:style-name="T2"/></text:p>
      <text:p text:style-name="P2"><text:span text:style-name="T2">title('Decision Boundary');</text:span></text:p>
      <text:p text:style-name="P2"><text:span text:style-name="T2">xlabel('Feature 1'); ylabel('Feature 2');</text:span></text:p>
      <text:p text:style-name="P2"><text:span text:style-name="T2">legend('Class -1', 'Class +1', 'Support Vectors', 'Location', 'best');</text:span></text:p>
      <text:p text:style-name="P2"><text:span text:style-name="T2">grid on;</text:span></text:p>
      <text:p text:style-name="P2"><text:span text:style-name="T2"/></text:p>
      <text:p text:style-name="P2"><text:span text:style-name="T2">%% 7. Visualize: Membership Distribution</text:span></text:p>
      <text:p text:style-name="P2"><text:span text:style-name="T2">subplot(1, 3, 3);</text:span></text:p>
      <text:p text:style-name="P2"><text:span text:style-name="T2"/></text:p>
      <text:p text:style-name="P2"><text:span text:style-name="T2">s_neg = s(y == -1);</text:span></text:p>
      <text:p text:style-name="P2"><text:span text:style-name="T2">s_pos = s(y == <text:s/>1);</text:span></text:p>
      <text:p text:style-name="P2"><text:span text:style-name="T2"/></text:p>
      <text:p text:style-name="P2"><text:span text:style-name="T2">histogram(s_neg, 15, 'FaceColor', 'r', 'FaceAlpha', 0.6, 'EdgeColor', 'k');</text:span></text:p>
      <text:p text:style-name="P2"><text:span text:style-name="T2">hold on;</text:span></text:p>
      <text:p text:style-name="P2"><text:span text:style-name="T2">histogram(s_pos, 15, 'FaceColor', 'b', 'FaceAlpha', 0.6, 'EdgeColor', 'k');</text:span></text:p>
      <text:p text:style-name="P2"><text:span text:style-name="T2">xlabel('Membership Value (s)');</text:span></text:p>
      <text:p text:style-name="P2"><text:span text:style-name="T2">ylabel('Count');</text:span></text:p>
      <text:p text:style-name="P2"><text:span text:style-name="T2">title('Membership Distribution by Class');</text:span></text:p>
      <text:p text:style-name="P2"><text:span text:style-name="T2">legend('Class -1', 'Class +1');</text:span></text:p>
      <text:p text:style-name="P2"><text:span text:style-name="T2">grid on;</text:span></text:p>
      <text:p text:style-name="P2"><text:span text:style-name="T2"/></text:p>
      <text:p text:style-name="P2"><text:span text:style-name="T2">sgtitle(sprintf('Fuzzy SVM <text:s/>| <text:s/>Accuracy: %.2f%% <text:s/>| <text:s/>SVs: %d', ...</text:span></text:p>
      <text:p text:style-name="P2"><text:span text:style-name="T2"><text:s text:c="8"/>acc, size(model.SupportVectors, 1)), 'FontSize', 13, 'FontWeight', 'bold')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draw:frame draw:style-name="fr2" draw:name="Image2" text:anchor-type="char" svg:width="17cm" svg:height="17.644cm" draw:z-index="1"><draw:image xlink:href="Pictures/1000000100000294000002AD586BF29A5146047A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3" text:anchor-type="char" svg:width="17cm" svg:height="18.364cm" draw:z-index="2"><draw:image xlink:href="Pictures/1000000100000294000002C9E906B63D01284AC7.png" xlink:type="simple" xlink:show="embed" xlink:actuate="onLoad" draw:mime-type="image/png"/></draw:frame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4" text:anchor-type="char" svg:width="17cm" svg:height="19.653cm" draw:z-index="3"><draw:image xlink:href="Pictures/1000000100000294000002FB9A7EDAAAD739F58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Output : </text:span></text:p>
      <text:p text:style-name="P2"><text:span text:style-name="T2"/></text:p>
      <text:p text:style-name="P2"><draw:frame draw:style-name="fr1" draw:name="Image1" text:anchor-type="char" svg:x="2.085cm" svg:y="0.332cm" svg:width="12.039cm" svg:height="7.091cm" draw:z-index="0"><draw:image xlink:href="Pictures/10000001000001C70000010C51E2EF89B623B70F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5" text:anchor-type="char" svg:x="0.132cm" svg:y="5.071cm" svg:width="17cm" svg:height="6.465cm" draw:z-index="4"><draw:image xlink:href="Pictures/10000001000004A2000001C3B32434FE952D6AB4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03:54:58.440523756</meta:creation-date>
    <dc:date>2026-04-26T04:19:53.978767181</dc:date>
    <meta:editing-duration>PT4M35S</meta:editing-duration>
    <meta:editing-cycles>1</meta:editing-cycles>
    <meta:document-statistic meta:table-count="0" meta:image-count="5" meta:object-count="0" meta:page-count="7" meta:paragraph-count="104" meta:word-count="474" meta:character-count="3400" meta:non-whitespace-character-count="2877"/>
    <meta:generator>LibreOffice/7.3.7.2$Linux_X86_64 LibreOffice_project/30$Build-2</meta:generator>
  </office:meta>
</office:document-meta>
</file>