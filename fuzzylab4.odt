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100000166B7C82CA94F532D21.png" manifest:media-type="image/png"/>
  <manifest:file-entry manifest:full-path="Pictures/10000001000004F1000001FF17D5283FFC41FDFC.png" manifest:media-type="image/png"/>
  <manifest:file-entry manifest:full-path="Pictures/10000001000001E0000002D9EA5277AE962A38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d8848" officeooo:paragraph-rsid="000a0018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officeooo:rsid="000d8848" officeooo:paragraph-rsid="000a0018"/>
    </style:style>
    <style:style style:name="P3" style:family="paragraph" style:parent-style-name="Standard">
      <style:text-properties fo:font-size="32pt" officeooo:rsid="000d8848" officeooo:paragraph-rsid="000a0018" style:font-size-asian="32pt" style:font-size-complex="3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a0018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- <text:s/>Md Ishrar</text:p>
      <text:p text:style-name="P2">Course - AIML </text:p>
      <text:p text:style-name="P2">Enrollment Number – 12019051623</text:p>
      <text:p text:style-name="P2"/>
      <text:p text:style-name="P2"/>
      <text:p text:style-name="P2"><text:tab/><text:tab/> <text:s text:c="32"/><text:span text:style-name="T2">Lab – </text:span><text:span text:style-name="T3">4</text:span></text:p>
      <text:p text:style-name="P3"/>
      <text:p text:style-name="P1">Code <text:span text:style-name="T1">-</text:span></text:p>
      <text:p text:style-name="P1"><text:span text:style-name="T1"/></text:p>
      <text:p text:style-name="P1"><text:span text:style-name="T1"><text:tab/>%% Lab 4: Fuzzy C-Means Clustering</text:span></text:p>
      <text:p text:style-name="P1"><text:span text:style-name="T1">% Save as: fuzzyCMeans_lab4.m</text:span></text:p>
      <text:p text:style-name="P1"><text:span text:style-name="T1"/></text:p>
      <text:p text:style-name="P1"><text:span text:style-name="T1">clc; clear; close all;</text:span></text:p>
      <text:p text:style-name="P1"><text:span text:style-name="T1"/></text:p>
      <text:p text:style-name="P1"><text:span text:style-name="T1">%% 1. Load and Prepare Data</text:span></text:p>
      <text:p text:style-name="P1"><text:span text:style-name="T1">load fisheriris</text:span></text:p>
      <text:p text:style-name="P1"><text:span text:style-name="T1">X = meas(:, 1:2); <text:s text:c="9"/>% Use 2 features for visualization</text:span></text:p>
      <text:p text:style-name="P1"><text:span text:style-name="T1">fprintf('Dataset: %d samples, %d features\n', size(X,1), size(X,2));</text:span></text:p>
      <text:p text:style-name="P1"><text:span text:style-name="T1"/></text:p>
      <text:p text:style-name="P1"><text:span text:style-name="T1">%% 2. Fuzzy C-Means Parameters</text:span></text:p>
      <text:p text:style-name="P1"><text:span text:style-name="T1">nClusters = 3;</text:span></text:p>
      <text:p text:style-name="P1"><text:span text:style-name="T1">m <text:s text:c="8"/>= 2.0;</text:span></text:p>
      <text:p text:style-name="P1"><text:span text:style-name="T1">maxIter <text:s text:c="2"/>= 200;</text:span></text:p>
      <text:p text:style-name="P1"><text:span text:style-name="T1">epsilon <text:s text:c="2"/>= 1e-5;</text:span></text:p>
      <text:p text:style-name="P1"><text:span text:style-name="T1">options <text:s text:c="2"/>= [m, maxIter, epsilon, 0];</text:span></text:p>
      <text:p text:style-name="P1"><text:span text:style-name="T1"/></text:p>
      <text:p text:style-name="P1"><text:span text:style-name="T1">%% 3. Run Fuzzy C-Means (FIXED: removed transpose X' -&gt; X)</text:span></text:p>
      <text:p text:style-name="P1"><text:span text:style-name="T1">[centers, U, objFcn] = fcm(X, nClusters, options);</text:span></text:p>
      <text:p text:style-name="P1"><text:span text:style-name="T1">% NOTE: fcm returns U as [nClusters x nSamples]</text:span></text:p>
      <text:p text:style-name="P1"><text:span text:style-name="T1"/></text:p>
      <text:p text:style-name="P1"><text:span text:style-name="T1">fprintf('\n--- FCM Results ---\n');</text:span></text:p>
      <text:p text:style-name="P1"><text:span text:style-name="T1">fprintf('Clusters <text:s text:c="4"/>: %d\n', nClusters);</text:span></text:p>
      <text:p text:style-name="P1"><text:span text:style-name="T1">fprintf('Fuzziness (m): %.1f\n', m);</text:span></text:p>
      <text:p text:style-name="P1"><text:span text:style-name="T1">fprintf('Final Obj Fn : %.6f\n', objFcn(end));</text:span></text:p>
      <text:p text:style-name="P1"><text:span text:style-name="T1">fprintf('Iterations <text:s text:c="2"/>: %d\n', length(objFcn));</text:span></text:p>
      <text:p text:style-name="P1"><text:span text:style-name="T1"/></text:p>
      <text:p text:style-name="P1"><text:span text:style-name="T1">%% 4. Assign Hard Labels (max membership)</text:span></text:p>
      <text:p text:style-name="P1"><text:span text:style-name="T1">[~, hardLabels] = max(U, [], 1);</text:span></text:p>
      <text:p text:style-name="P1"><text:span text:style-name="T1">hardLabels = hardLabels';</text:span></text:p>
      <text:p text:style-name="P1"><text:span text:style-name="T1"/></text:p>
      <text:p text:style-name="P1"><text:span text:style-name="T1">%% 5. Print Cluster Centers</text:span></text:p>
      <text:p text:style-name="P1"><text:span text:style-name="T1">fprintf('\nCluster Centers:\n');</text:span></text:p>
      <text:p text:style-name="P1"><text:span text:style-name="T1">fprintf('%-10s %-15s %-15s\n', 'Cluster', 'Feature 1', 'Feature 2');</text:span></text:p>
      <text:p text:style-name="P1"><text:span text:style-name="T1">fprintf('%s\n', repmat('-', 1, 40));</text:span></text:p>
      <text:p text:style-name="P1"><text:span text:style-name="T1">for c = 1:nClusters</text:span></text:p>
      <text:p text:style-name="P1"><text:span text:style-name="T1"><text:s text:c="4"/>fprintf('%-10d %-15.4f %-15.4f\n', c, centers(c,1), centers(c,2));</text:span></text:p>
      <text:p text:style-name="P1"><text:soft-page-break/><text:span text:style-name="T1">end</text:span></text:p>
      <text:p text:style-name="P1"><text:span text:style-name="T1"/></text:p>
      <text:p text:style-name="P1"><text:span text:style-name="T1">%% 6. Print Membership Matrix (first 10 samples)</text:span></text:p>
      <text:p text:style-name="P1"><text:span text:style-name="T1">fprintf('\nMembership Matrix (first 10 samples):\n');</text:span></text:p>
      <text:p text:style-name="P1"><text:span text:style-name="T1">fprintf('%-8s', 'Sample');</text:span></text:p>
      <text:p text:style-name="P1"><text:span text:style-name="T1">for c = 1:nClusters</text:span></text:p>
      <text:p text:style-name="P1"><text:span text:style-name="T1"><text:s text:c="4"/>fprintf('%-15s', ['Cluster ' num2str(c)]);</text:span></text:p>
      <text:p text:style-name="P1"><text:span text:style-name="T1">end</text:span></text:p>
      <text:p text:style-name="P1"><text:span text:style-name="T1">fprintf('\n%s\n', repmat('-', 1, 8 + 15*nClusters));</text:span></text:p>
      <text:p text:style-name="P1"><text:span text:style-name="T1">for i = 1:10</text:span></text:p>
      <text:p text:style-name="P1"><text:span text:style-name="T1"><text:s text:c="4"/>fprintf('%-8d', i);</text:span></text:p>
      <text:p text:style-name="P1"><text:span text:style-name="T1"><text:s text:c="4"/>for c = 1:nClusters</text:span></text:p>
      <text:p text:style-name="P1"><text:span text:style-name="T1"><text:s text:c="8"/>fprintf('%-15.4f', U(c,i));</text:span></text:p>
      <text:p text:style-name="P1"><text:span text:style-name="T1"><text:s text:c="4"/>end</text:span></text:p>
      <text:p text:style-name="P1"><text:span text:style-name="T1"><text:s text:c="4"/>fprintf('\n');</text:span></text:p>
      <text:p text:style-name="P1"><text:span text:style-name="T1">end</text:span></text:p>
      <text:p text:style-name="P1"><text:span text:style-name="T1"/></text:p>
      <text:p text:style-name="P1"><text:span text:style-name="T1">%% 7. Cluster Statistics</text:span></text:p>
      <text:p text:style-name="P1"><text:span text:style-name="T1">fprintf('\nCluster Statistics:\n');</text:span></text:p>
      <text:p text:style-name="P1"><text:span text:style-name="T1">fprintf('%-10s %-10s %-15s %-15s\n', 'Cluster', 'Count', 'Avg Membership', 'Max Membership');</text:span></text:p>
      <text:p text:style-name="P1"><text:span text:style-name="T1">fprintf('%s\n', repmat('-', 1, 50));</text:span></text:p>
      <text:p text:style-name="P1"><text:span text:style-name="T1">for c = 1:nClusters</text:span></text:p>
      <text:p text:style-name="P1"><text:span text:style-name="T1"><text:s text:c="4"/>members <text:s/>= sum(hardLabels == c);</text:span></text:p>
      <text:p text:style-name="P1"><text:span text:style-name="T1"><text:s text:c="4"/>avgMemb <text:s/>= mean(U(c, hardLabels == c));</text:span></text:p>
      <text:p text:style-name="P1"><text:span text:style-name="T1"><text:s text:c="4"/>maxMemb <text:s/>= max(U(c,:));</text:span></text:p>
      <text:p text:style-name="P1"><text:span text:style-name="T1"><text:s text:c="4"/>fprintf('%-10d %-10d %-15.4f %-15.4f\n', c, members, avgMemb, maxMemb);</text:span></text:p>
      <text:p text:style-name="P1"><text:span text:style-name="T1">end</text:span></text:p>
      <text:p text:style-name="P1"><text:span text:style-name="T1"/></text:p>
      <text:p text:style-name="P1"><text:span text:style-name="T1">%% 8. Compare with True Labels</text:span></text:p>
      <text:p text:style-name="P1"><text:span text:style-name="T1">trueLabels = grp2idx(species);</text:span></text:p>
      <text:p text:style-name="P1"><text:span text:style-name="T1">fprintf('\nCluster vs True Label Comparison:\n');</text:span></text:p>
      <text:p text:style-name="P1"><text:span text:style-name="T1">fprintf('%-10s', 'Cluster');</text:span></text:p>
      <text:p text:style-name="P1"><text:span text:style-name="T1">fprintf('%-15s', 'Setosa', 'Versicolor', 'Virginica');</text:span></text:p>
      <text:p text:style-name="P1"><text:span text:style-name="T1">fprintf('\n%s\n', repmat('-', 1, 55));</text:span></text:p>
      <text:p text:style-name="P1"><text:span text:style-name="T1">for c = 1:nClusters</text:span></text:p>
      <text:p text:style-name="P1"><text:span text:style-name="T1"><text:s text:c="4"/>idx_c = hardLabels == c;</text:span></text:p>
      <text:p text:style-name="P1"><text:span text:style-name="T1"><text:s text:c="4"/>fprintf('%-10d', c);</text:span></text:p>
      <text:p text:style-name="P1"><text:span text:style-name="T1"><text:s text:c="4"/>for t = 1:3</text:span></text:p>
      <text:p text:style-name="P1"><text:span text:style-name="T1"><text:s text:c="8"/>fprintf('%-15d', sum(trueLabels(idx_c) == t));</text:span></text:p>
      <text:p text:style-name="P1"><text:span text:style-name="T1"><text:s text:c="4"/>end</text:span></text:p>
      <text:p text:style-name="P1"><text:span text:style-name="T1"><text:s text:c="4"/>fprintf('\n');</text:span></text:p>
      <text:p text:style-name="P1"><text:span text:style-name="T1">end</text:span></text:p>
      <text:p text:style-name="P1"><text:span text:style-name="T1"/></text:p>
      <text:p text:style-name="P1"><text:span text:style-name="T1">%% 9. Plot 1 - FCM Clustering Result</text:span></text:p>
      <text:p text:style-name="P1"><text:span text:style-name="T1">colors <text:s/>= ['r', 'b', 'g'];</text:span></text:p>
      <text:p text:style-name="P1"><text:span text:style-name="T1">markers = ['o', 's', '^'];</text:span></text:p>
      <text:p text:style-name="P1"><text:span text:style-name="T1"/></text:p>
      <text:p text:style-name="P1"><text:soft-page-break/><text:span text:style-name="T1">figure('Name', 'Lab 4: Fuzzy C-Means Clustering', 'Position', [50 50 1300 500]);</text:span></text:p>
      <text:p text:style-name="P1"><text:span text:style-name="T1"/></text:p>
      <text:p text:style-name="P1"><text:span text:style-name="T1">subplot(1, 3, 1);</text:span></text:p>
      <text:p text:style-name="P1"><text:span text:style-name="T1">hold on;</text:span></text:p>
      <text:p text:style-name="P1"><text:span text:style-name="T1">for c = 1:nClusters</text:span></text:p>
      <text:p text:style-name="P1"><text:span text:style-name="T1"><text:s text:c="4"/>idx_c = hardLabels == c;</text:span></text:p>
      <text:p text:style-name="P1"><text:span text:style-name="T1"><text:s text:c="4"/>scatter(X(idx_c,1), X(idx_c,2), 50, colors(c), markers(c), ...</text:span></text:p>
      <text:p text:style-name="P1"><text:span text:style-name="T1"><text:s text:c="12"/>'filled', 'MarkerEdgeColor', 'k', 'LineWidth', 0.5);</text:span></text:p>
      <text:p text:style-name="P1"><text:span text:style-name="T1">end</text:span></text:p>
      <text:p text:style-name="P1"><text:span text:style-name="T1">for c = 1:nClusters</text:span></text:p>
      <text:p text:style-name="P1"><text:span text:style-name="T1"><text:s text:c="4"/>scatter(centers(c,1), centers(c,2), 200, colors(c), 'p', ...</text:span></text:p>
      <text:p text:style-name="P1"><text:span text:style-name="T1"><text:s text:c="12"/>'filled', 'MarkerEdgeColor', 'k', 'LineWidth', 1.5);</text:span></text:p>
      <text:p text:style-name="P1"><text:span text:style-name="T1">end</text:span></text:p>
      <text:p text:style-name="P1"><text:span text:style-name="T1">title('FCM Clustering Result');</text:span></text:p>
      <text:p text:style-name="P1"><text:span text:style-name="T1">xlabel('Feature 1 (Sepal Length)');</text:span></text:p>
      <text:p text:style-name="P1"><text:span text:style-name="T1">ylabel('Feature 2 (Sepal Width)');</text:span></text:p>
      <text:p text:style-name="P1"><text:span text:style-name="T1">legend('Cluster 1','Cluster 2','Cluster 3','Center 1','Center 2','Center 3', ...</text:span></text:p>
      <text:p text:style-name="P1"><text:span text:style-name="T1"><text:s text:c="7"/>'Location', 'best');</text:span></text:p>
      <text:p text:style-name="P1"><text:span text:style-name="T1">grid on; hold off;</text:span></text:p>
      <text:p text:style-name="P1"><text:span text:style-name="T1"/></text:p>
      <text:p text:style-name="P1"><text:span text:style-name="T1">%% 10. Plot 2 - Membership Heatmap</text:span></text:p>
      <text:p text:style-name="P1"><text:span text:style-name="T1">subplot(1, 3, 2);</text:span></text:p>
      <text:p text:style-name="P1"><text:span text:style-name="T1">imagesc(U);</text:span></text:p>
      <text:p text:style-name="P1"><text:span text:style-name="T1">colormap(gca, 'parula');</text:span></text:p>
      <text:p text:style-name="P1"><text:span text:style-name="T1">colorbar;</text:span></text:p>
      <text:p text:style-name="P1"><text:span text:style-name="T1">xlabel('Sample Index');</text:span></text:p>
      <text:p text:style-name="P1"><text:span text:style-name="T1">ylabel('Cluster');</text:span></text:p>
      <text:p text:style-name="P1"><text:span text:style-name="T1">yticks(1:nClusters);</text:span></text:p>
      <text:p text:style-name="P1"><text:span text:style-name="T1">yticklabels({'Cluster 1', 'Cluster 2', 'Cluster 3'});</text:span></text:p>
      <text:p text:style-name="P1"><text:span text:style-name="T1">title('Membership Matrix Heatmap');</text:span></text:p>
      <text:p text:style-name="P1"><text:span text:style-name="T1"/></text:p>
      <text:p text:style-name="P1"><text:span text:style-name="T1">%% 11. Plot 3 - Objective Function Convergence</text:span></text:p>
      <text:p text:style-name="P1"><text:span text:style-name="T1">subplot(1, 3, 3);</text:span></text:p>
      <text:p text:style-name="P1"><text:span text:style-name="T1">plot(1:length(objFcn), objFcn, 'b-o', 'LineWidth', 2, ...</text:span></text:p>
      <text:p text:style-name="P1"><text:span text:style-name="T1"><text:s text:c="5"/>'MarkerFaceColor', 'b', 'MarkerSize', 4);</text:span></text:p>
      <text:p text:style-name="P1"><text:span text:style-name="T1">xlabel('Iteration');</text:span></text:p>
      <text:p text:style-name="P1"><text:span text:style-name="T1">ylabel('Objective Function Value');</text:span></text:p>
      <text:p text:style-name="P1"><text:span text:style-name="T1">title('FCM Convergence');</text:span></text:p>
      <text:p text:style-name="P1"><text:span text:style-name="T1">grid on;</text:span></text:p>
      <text:p text:style-name="P1"><text:span text:style-name="T1"/></text:p>
      <text:p text:style-name="P1"><text:span text:style-name="T1">sgtitle('Lab 4: Fuzzy C-Means Clustering on Iris Dataset', ...</text:span></text:p>
      <text:p text:style-name="P1"><text:span text:style-name="T1"><text:s text:c="8"/>'FontSize', 13, 'FontWeight', 'bold');</text:span></text:p>
      <text:p text:style-name="P1"><text:span text:style-name="T1"/></text:p>
      <text:p text:style-name="P1"><text:span text:style-name="T1">%% 12. Plot 4 - Membership values per cluster</text:span></text:p>
      <text:p text:style-name="P1"><text:span text:style-name="T1">figure('Name', 'Membership Values', 'Position', [50 600 1300 350]);</text:span></text:p>
      <text:p text:style-name="P1"><text:span text:style-name="T1">for c = 1:nClusters</text:span></text:p>
      <text:p text:style-name="P1"><text:span text:style-name="T1"><text:s text:c="4"/>subplot(1, nClusters, c);</text:span></text:p>
      <text:p text:style-name="P1"><text:span text:style-name="T1"><text:s text:c="4"/>bar(U(c,:), 'FaceColor', colors(c), 'EdgeColor', 'none');</text:span></text:p>
      <text:p text:style-name="P1"><text:soft-page-break/><text:span text:style-name="T1"><text:s text:c="4"/>xlabel('Sample Index');</text:span></text:p>
      <text:p text:style-name="P1"><text:span text:style-name="T1"><text:s text:c="4"/>ylabel('Membership Value');</text:span></text:p>
      <text:p text:style-name="P1"><text:span text:style-name="T1"><text:s text:c="4"/>title(['Cluster ' num2str(c) ' Memberships']);</text:span></text:p>
      <text:p text:style-name="P1"><text:span text:style-name="T1"><text:s text:c="4"/>ylim([0 1]);</text:span></text:p>
      <text:p text:style-name="P1"><text:span text:style-name="T1"><text:s text:c="4"/>grid on;</text:span></text:p>
      <text:p text:style-name="P1"><text:span text:style-name="T1">end</text:span></text:p>
      <text:p text:style-name="P1"><text:span text:style-name="T1">sgtitle('Membership Values for Each Cluster', 'FontSize', 12, 'FontWeight', 'bold');</text:span></text:p>
      <text:p text:style-name="Standard"/>
      <text:p text:style-name="Standard"/>
      <text:p text:style-name="Standard"/>
      <text:p text:style-name="Standard"><draw:frame draw:style-name="fr1" draw:name="Image1" text:anchor-type="char" svg:x="1.201cm" svg:y="0.217cm" svg:width="12.7cm" svg:height="19.288cm" draw:z-index="0"><draw:image xlink:href="Pictures/10000001000001E0000002D9EA5277AE962A38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5" text:anchor-type="char" svg:x="-0.328cm" svg:y="0.153cm" svg:width="17cm" svg:height="6.867cm" draw:z-index="2"><draw:image xlink:href="Pictures/10000001000004F1000001FF17D5283FFC41FD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cm" svg:y="0.069cm" svg:width="16.794cm" svg:height="4.752cm" draw:z-index="1"><draw:image xlink:href="Pictures/10000001000004F100000166B7C82CA94F532D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9:18:24.298954805</meta:creation-date>
    <dc:date>2026-04-26T19:22:57.656772885</dc:date>
    <meta:editing-duration>PT4M33S</meta:editing-duration>
    <meta:editing-cycles>1</meta:editing-cycles>
    <meta:document-statistic meta:table-count="0" meta:image-count="3" meta:object-count="0" meta:page-count="5" meta:paragraph-count="127" meta:word-count="527" meta:character-count="4165" meta:non-whitespace-character-count="3533"/>
    <meta:generator>LibreOffice/7.3.7.2$Linux_X86_64 LibreOffice_project/30$Build-2</meta:generator>
  </office:meta>
</office:document-meta>
</file>