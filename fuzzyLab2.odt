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D00000259DFD703EDB7A753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693f" officeooo:paragraph-rsid="0001693f"/>
    </style:style>
    <style:style style:name="T1" style:family="text">
      <style:text-properties officeooo:rsid="0001693f"/>
    </style:style>
    <style:style style:name="T2" style:family="text">
      <style:text-properties fo:font-size="32pt" officeooo:rsid="0001693f" style:font-size-asian="32pt" style:font-size-complex="3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– Md Ishrar</text:p>
      <text:p text:style-name="P1">Course – AIML</text:p>
      <text:p text:style-name="P1">Batch – B2</text:p>
      <text:p text:style-name="P1">Subject - fuzzy Logic</text:p>
      <text:p text:style-name="P1">Roll - 12019051623</text:p>
      <text:p text:style-name="Standard"/>
      <text:p text:style-name="Standard"><text:tab/><text:tab/><text:tab/><text:tab/><text:span text:style-name="T2">Lab 2 Experiment</text:span></text:p>
      <text:p text:style-name="Standard"/>
      <text:p text:style-name="Standard">%% Basic Membership Functions in Fuzzy Logic</text:p>
      <text:p text:style-name="Standard">clc; clear; close all;</text:p>
      <text:p text:style-name="Standard"/>
      <text:p text:style-name="Standard">x = 0:0.01:10; <text:s/>% Universe of discourse</text:p>
      <text:p text:style-name="Standard"/>
      <text:p text:style-name="Standard">%% 1. Triangular Membership Function (trimf)</text:p>
      <text:p text:style-name="Standard">% Parameters: [a b c] — left, peak, right</text:p>
      <text:p text:style-name="Standard">mf_tri = trimf(x, [2 5 8]);</text:p>
      <text:p text:style-name="Standard"/>
      <text:p text:style-name="Standard">figure;</text:p>
      <text:p text:style-name="Standard">subplot(3,2,1);</text:p>
      <text:p text:style-name="Standard">plot(x, mf_tri, 'b', 'LineWidth', 2);</text:p>
      <text:p text:style-name="Standard">title('Triangular MF');</text:p>
      <text:p text:style-name="Standard">xlabel('x'); ylabel('\mu(x)');</text:p>
      <text:p text:style-name="Standard">ylim([-0.1 1.1]); grid on;</text:p>
      <text:p text:style-name="Standard"/>
      <text:p text:style-name="Standard">%% 2. Trapezoidal Membership Function (trapmf)</text:p>
      <text:p text:style-name="Standard">% Parameters: [a b c d] — left foot, left shoulder, right shoulder, right foot</text:p>
      <text:p text:style-name="Standard">mf_trap = trapmf(x, [1 3 7 9]);</text:p>
      <text:p text:style-name="Standard"/>
      <text:p text:style-name="Standard">subplot(3,2,2);</text:p>
      <text:p text:style-name="Standard">plot(x, mf_trap, 'r', 'LineWidth', 2);</text:p>
      <text:p text:style-name="Standard">title('Trapezoidal MF');</text:p>
      <text:p text:style-name="Standard">xlabel('x'); ylabel('\mu(x)');</text:p>
      <text:p text:style-name="Standard">ylim([-0.1 1.1]); grid on;</text:p>
      <text:p text:style-name="Standard"/>
      <text:p text:style-name="Standard">%% 3. Gaussian Membership Function (gaussmf)</text:p>
      <text:p text:style-name="Standard">% Parameters: [sigma mean]</text:p>
      <text:p text:style-name="Standard">mf_gauss = gaussmf(x, [1 5]);</text:p>
      <text:p text:style-name="Standard"/>
      <text:p text:style-name="Standard">subplot(3,2,3);</text:p>
      <text:p text:style-name="Standard">plot(x, mf_gauss, 'g', 'LineWidth', 2);</text:p>
      <text:p text:style-name="Standard">title('Gaussian MF');</text:p>
      <text:p text:style-name="Standard">xlabel('x'); ylabel('\mu(x)');</text:p>
      <text:p text:style-name="Standard">ylim([-0.1 1.1]); grid on;</text:p>
      <text:p text:style-name="Standard"/>
      <text:p text:style-name="Standard">%% 4. Generalized Bell Membership Function (gbellmf)</text:p>
      <text:p text:style-name="Standard">% Parameters: [a b c] — width, slope, center</text:p>
      <text:p text:style-name="Standard">mf_bell = gbellmf(x, [2 4 5]);</text:p>
      <text:p text:style-name="Standard"/>
      <text:p text:style-name="Standard">subplot(3,2,4);</text:p>
      <text:p text:style-name="Standard">plot(x, mf_bell, 'm', 'LineWidth', 2);</text:p>
      <text:p text:style-name="Standard">title('Generalized Bell MF');</text:p>
      <text:p text:style-name="Standard"><text:soft-page-break/>xlabel('x'); ylabel('\mu(x)');</text:p>
      <text:p text:style-name="Standard">ylim([-0.1 1.1]); grid on;</text:p>
      <text:p text:style-name="Standard"/>
      <text:p text:style-name="Standard">%% 5. Sigmoid Membership Function (sigmf)</text:p>
      <text:p text:style-name="Standard">% Parameters: [a c] — slope, inflection point</text:p>
      <text:p text:style-name="Standard">mf_sig = sigmf(x, [2 5]);</text:p>
      <text:p text:style-name="Standard"/>
      <text:p text:style-name="Standard">subplot(3,2,5);</text:p>
      <text:p text:style-name="Standard">plot(x, mf_sig, 'c', 'LineWidth', 2);</text:p>
      <text:p text:style-name="Standard">title('Sigmoid MF');</text:p>
      <text:p text:style-name="Standard">xlabel('x'); ylabel('\mu(x)');</text:p>
      <text:p text:style-name="Standard">ylim([-0.1 1.1]); grid on;</text:p>
      <text:p text:style-name="Standard"/>
      <text:p text:style-name="Standard">%% 6. Z-shaped, Pi-shaped, S-shaped MFs</text:p>
      <text:p text:style-name="Standard">mf_z <text:s/>= zmf(x, <text:s/>[3 7]); <text:s text:c="3"/>% Z-shaped (decreasing)</text:p>
      <text:p text:style-name="Standard">mf_s <text:s/>= smf(x, <text:s/>[3 7]); <text:s text:c="3"/>% S-shaped (increasing)</text:p>
      <text:p text:style-name="Standard">mf_pi = pimf(x, [1 4 6 9]);% Pi-shaped (bell using S and Z)</text:p>
      <text:p text:style-name="Standard"/>
      <text:p text:style-name="Standard">subplot(3,2,6);</text:p>
      <text:p text:style-name="Standard">plot(x, mf_z, 'b--', x, mf_s, 'r-', x, mf_pi, 'g:', 'LineWidth', 2);</text:p>
      <text:p text:style-name="Standard">legend('Z-MF','S-MF','Pi-MF');</text:p>
      <text:p text:style-name="Standard">title('Z / S / Pi MFs');</text:p>
      <text:p text:style-name="Standard">xlabel('x'); ylabel('\mu(x)');</text:p>
      <text:p text:style-name="Standard">ylim([-0.1 1.1]); grid on;</text:p>
      <text:p text:style-name="Standard"/>
      <text:p text:style-name="Standard">sgtitle('Basic Fuzzy Membership Functions');</text:p>
      <text:p text:style-name="Standard"/>
      <text:p text:style-name="Standard">%% ---- Manual Implementation (No Toolbox Required) ----</text:p>
      <text:p text:style-name="Standard"/>
      <text:p text:style-name="Standard">fprintf('\n--- Manual Membership Function Values at x=5 ---\n');</text:p>
      <text:p text:style-name="Standard"/>
      <text:p text:style-name="Standard">% Triangular</text:p>
      <text:p text:style-name="Standard">x0 = 5; a=2; b=5; c=8;</text:p>
      <text:p text:style-name="Standard">if x0 &lt;= a || x0 &gt;= c</text:p>
      <text:p text:style-name="Standard"><text:s text:c="4"/>mu_tri = 0;</text:p>
      <text:p text:style-name="Standard">elseif x0 &lt;= b</text:p>
      <text:p text:style-name="Standard"><text:s text:c="4"/>mu_tri = (x0 - a) / (b - a);</text:p>
      <text:p text:style-name="Standard">else</text:p>
      <text:p text:style-name="Standard"><text:s text:c="4"/>mu_tri = (c - x0) / (c - b);</text:p>
      <text:p text:style-name="Standard">end</text:p>
      <text:p text:style-name="Standard">fprintf('Triangular MF at x=5: %.4f\n', mu_tri);</text:p>
      <text:p text:style-name="Standard"/>
      <text:p text:style-name="Standard">% Gaussian</text:p>
      <text:p text:style-name="Standard">sigma = 1; c_g = 5;</text:p>
      <text:p text:style-name="Standard">mu_gauss = exp(-((x0 - c_g)^2) / (2 * sigma^2));</text:p>
      <text:p text:style-name="Standard">fprintf('Gaussian <text:s text:c="2"/>MF at x=5: %.4f\n', mu_gauss);</text:p>
      <text:p text:style-name="Standard"/>
      <text:p text:style-name="Standard">% Sigmoid</text:p>
      <text:p text:style-name="Standard">a_s = 2; c_s = 5;</text:p>
      <text:p text:style-name="Standard">mu_sig = 1 / (1 + exp(-a_s * (x0 - c_s)));</text:p>
      <text:p text:style-name="Standard"><text:soft-page-break/>fprintf<draw:frame draw:style-name="fr1" draw:name="Image1" text:anchor-type="char" svg:x="0.441cm" svg:y="2.325cm" svg:width="17cm" svg:height="7.355cm" draw:z-index="0"><draw:image xlink:href="Pictures/100000010000056D00000259DFD703EDB7A7530C.png" xlink:type="simple" xlink:show="embed" xlink:actuate="onLoad" draw:mime-type="image/png"/></draw:frame>('Sigmoid <text:s text:c="3"/>MF at x=5: %.4f\n', mu_sig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2T22:36:12.231212703</meta:creation-date>
    <dc:date>2026-03-22T22:39:16.040596708</dc:date>
    <meta:editing-duration>PT3M4S</meta:editing-duration>
    <meta:editing-cycles>1</meta:editing-cycles>
    <meta:document-statistic meta:table-count="0" meta:image-count="1" meta:object-count="0" meta:page-count="3" meta:paragraph-count="81" meta:word-count="387" meta:character-count="2475" meta:non-whitespace-character-count="2132"/>
    <meta:generator>LibreOffice/7.3.7.2$Linux_X86_64 LibreOffice_project/30$Build-2</meta:generator>
  </office:meta>
</office:document-meta>
</file>