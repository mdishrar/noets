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D000002590A4426AE657C2F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306" officeooo:paragraph-rsid="0003a30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Md Ishrar</text:p>
      <text:p text:style-name="P1">Course – AIML</text:p>
      <text:p text:style-name="P1">Batch – B2</text:p>
      <text:p text:style-name="P1">Course – Fuzzy Logic</text:p>
      <text:p text:style-name="Standard"/>
      <text:p text:style-name="Standard"/>
      <text:p text:style-name="Standard"/>
      <text:p text:style-name="Standard">%% Fuzzy Set Operations: Complement, Union, Intersection</text:p>
      <text:p text:style-name="Standard">clc; clear; close all;</text:p>
      <text:p text:style-name="Standard"/>
      <text:p text:style-name="Standard">x = 0:0.01:10; <text:s/>% Universe of discourse</text:p>
      <text:p text:style-name="Standard"/>
      <text:p text:style-name="Standard">%% Define Two Fuzzy Sets (Membership Functions)</text:p>
      <text:p text:style-name="Standard">A = trimf(x, [1 4 7]); <text:s text:c="6"/>% Fuzzy Set A — Triangular</text:p>
      <text:p text:style-name="Standard">B = gaussmf(x, [1.5 6]); <text:s text:c="4"/>% Fuzzy Set B — Gaussian</text:p>
      <text:p text:style-name="Standard"/>
      <text:p text:style-name="Standard">%% ============================================================</text:p>
      <text:p text:style-name="Standard">%% 1. COMPLEMENT <text:s/>→ <text:s/>A' = 1 - A</text:p>
      <text:p text:style-name="Standard">%% ============================================================</text:p>
      <text:p text:style-name="Standard">A_comp = 1 - A;</text:p>
      <text:p text:style-name="Standard">B_comp = 1 - B;</text:p>
      <text:p text:style-name="Standard"/>
      <text:p text:style-name="Standard">%% ============================================================</text:p>
      <text:p text:style-name="Standard">%% 2. UNION <text:s/>→ <text:s/>A ∪ B = max(A, B)</text:p>
      <text:p text:style-name="Standard">%% ============================================================</text:p>
      <text:p text:style-name="Standard">A_union_B = max(A, B);</text:p>
      <text:p text:style-name="Standard"/>
      <text:p text:style-name="Standard">%% ============================================================</text:p>
      <text:p text:style-name="Standard">%% 3. INTERSECTION <text:s/>→ <text:s/>A ∩ B = min(A, B)</text:p>
      <text:p text:style-name="Standard">%% ============================================================</text:p>
      <text:p text:style-name="Standard">A_inter_B = min(A, B);</text:p>
      <text:p text:style-name="Standard"/>
      <text:p text:style-name="Standard">%% ============================================================</text:p>
      <text:p text:style-name="Standard">%% PLOTTING ALL OPERATIONS</text:p>
      <text:p text:style-name="Standard">%% ============================================================</text:p>
      <text:p text:style-name="Standard"/>
      <text:p text:style-name="Standard">figure('Color','white','Position',[100 100 1000 700]);</text:p>
      <text:p text:style-name="Standard"/>
      <text:p text:style-name="Standard">%--- Original Sets ---%</text:p>
      <text:p text:style-name="Standard">subplot(3,2,1);</text:p>
      <text:p text:style-name="Standard">plot(x, A, 'b', 'LineWidth', 2); hold on;</text:p>
      <text:p text:style-name="Standard">plot(x, B, 'r', 'LineWidth', 2);</text:p>
      <text:p text:style-name="Standard">legend('Set A (Triangular)','Set B (Gaussian)');</text:p>
      <text:p text:style-name="Standard">title('Original Fuzzy Sets A and B');</text:p>
      <text:p text:style-name="Standard">xlabel('x'); ylabel('\mu(x)');</text:p>
      <text:p text:style-name="Standard">ylim([-0.1 1.2]); grid on;</text:p>
      <text:p text:style-name="Standard"/>
      <text:p text:style-name="Standard">%--- Complement of A ---%</text:p>
      <text:p text:style-name="Standard">subplot(3,2,2);</text:p>
      <text:p text:style-name="Standard">plot(x, A, 'b--', 'LineWidth', 1.5); hold on;</text:p>
      <text:p text:style-name="Standard">plot(x, A_comp, 'b', 'LineWidth', 2);</text:p>
      <text:p text:style-name="Standard">legend("Set A", "Complement A' = 1 - A");</text:p>
      <text:p text:style-name="Standard"><text:soft-page-break/>title("Complement of A: <text:s/>\mu_{A'} = 1 - \mu_A");</text:p>
      <text:p text:style-name="Standard">xlabel('x'); ylabel('\mu(x)');</text:p>
      <text:p text:style-name="Standard">ylim([-0.1 1.2]); grid on;</text:p>
      <text:p text:style-name="Standard"/>
      <text:p text:style-name="Standard">%--- Complement of B ---%</text:p>
      <text:p text:style-name="Standard">subplot(3,2,3);</text:p>
      <text:p text:style-name="Standard">plot(x, B, 'r--', 'LineWidth', 1.5); hold on;</text:p>
      <text:p text:style-name="Standard">plot(x, B_comp, 'r', 'LineWidth', 2);</text:p>
      <text:p text:style-name="Standard">legend("Set B", "Complement B' = 1 - B");</text:p>
      <text:p text:style-name="Standard">title("Complement of B: <text:s/>\mu_{B'} = 1 - \mu_B");</text:p>
      <text:p text:style-name="Standard">xlabel('x'); ylabel('\mu(x)');</text:p>
      <text:p text:style-name="Standard">ylim([-0.1 1.2]); grid on;</text:p>
      <text:p text:style-name="Standard"/>
      <text:p text:style-name="Standard">%--- Union ---%</text:p>
      <text:p text:style-name="Standard">subplot(3,2,4);</text:p>
      <text:p text:style-name="Standard">plot(x, A, 'b--', 'LineWidth', 1.5); hold on;</text:p>
      <text:p text:style-name="Standard">plot(x, B, 'r--', 'LineWidth', 1.5);</text:p>
      <text:p text:style-name="Standard">plot(x, A_union_B, 'k', 'LineWidth', 2.5);</text:p>
      <text:p text:style-name="Standard">fill(x, A_union_B, 'y', 'FaceAlpha', 0.3, 'EdgeColor','none');</text:p>
      <text:p text:style-name="Standard">legend('Set A','Set B','A \cup B = max(A,B)');</text:p>
      <text:p text:style-name="Standard">title('Union: <text:s/>\mu_{A \cup B} = max(\mu_A, \mu_B)');</text:p>
      <text:p text:style-name="Standard">xlabel('x'); ylabel('\mu(x)');</text:p>
      <text:p text:style-name="Standard">ylim([-0.1 1.2]); grid on;</text:p>
      <text:p text:style-name="Standard"/>
      <text:p text:style-name="Standard">%--- Intersection ---%</text:p>
      <text:p text:style-name="Standard">subplot(3,2,5);</text:p>
      <text:p text:style-name="Standard">plot(x, A, 'b--', 'LineWidth', 1.5); hold on;</text:p>
      <text:p text:style-name="Standard">plot(x, B, 'r--', 'LineWidth', 1.5);</text:p>
      <text:p text:style-name="Standard">plot(x, A_inter_B, 'k', 'LineWidth', 2.5);</text:p>
      <text:p text:style-name="Standard">fill(x, A_inter_B, 'c', 'FaceAlpha', 0.4, 'EdgeColor','none');</text:p>
      <text:p text:style-name="Standard">legend('Set A','Set B','A \cap B = min(A,B)');</text:p>
      <text:p text:style-name="Standard">title('Intersection: <text:s/>\mu_{A \cap B} = min(\mu_A, \mu_B)');</text:p>
      <text:p text:style-name="Standard">xlabel('x'); ylabel('\mu(x)');</text:p>
      <text:p text:style-name="Standard">ylim([-0.1 1.2]); grid on;</text:p>
      <text:p text:style-name="Standard"/>
      <text:p text:style-name="Standard">%--- All Together ---%</text:p>
      <text:p text:style-name="Standard">subplot(3,2,6);</text:p>
      <text:p text:style-name="Standard">plot(x, A, <text:s text:c="8"/>'b--', 'LineWidth', 1.5); hold on;</text:p>
      <text:p text:style-name="Standard">plot(x, B, <text:s text:c="8"/>'r--', 'LineWidth', 1.5);</text:p>
      <text:p text:style-name="Standard">plot(x, A_comp, <text:s text:c="3"/>'b', <text:s text:c="2"/>'LineWidth', 2);</text:p>
      <text:p text:style-name="Standard">plot(x, A_union_B, 'g', <text:s text:c="2"/>'LineWidth', 2);</text:p>
      <text:p text:style-name="Standard">plot(x, A_inter_B, 'm', <text:s text:c="2"/>'LineWidth', 2);</text:p>
      <text:p text:style-name="Standard">legend("A","B","A' (Complement)","A∪B (Union)","A∩B (Intersection)");</text:p>
      <text:p text:style-name="Standard">title('All Operations Combined');</text:p>
      <text:p text:style-name="Standard">xlabel('x'); ylabel('\mu(x)');</text:p>
      <text:p text:style-name="Standard">ylim([-0.1 1.2]); grid on;</text:p>
      <text:p text:style-name="Standard"/>
      <text:p text:style-name="Standard"><text:soft-page-break/>sgtitle('Fuzzy Set Operations', 'FontSize', 14, 'FontWeight', 'bold');<draw:frame draw:style-name="fr1" draw:name="Image1" text:anchor-type="char" svg:width="17cm" svg:height="11.045cm" draw:z-index="0"><draw:image xlink:href="Pictures/100000010000039D000002590A4426AE657C2F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22:42:55.222651178</meta:creation-date>
    <dc:date>2026-03-22T22:47:14.675506739</dc:date>
    <meta:editing-duration>PT4M19S</meta:editing-duration>
    <meta:editing-cycles>1</meta:editing-cycles>
    <meta:document-statistic meta:table-count="0" meta:image-count="1" meta:object-count="0" meta:page-count="3" meta:paragraph-count="83" meta:word-count="401" meta:character-count="3119" meta:non-whitespace-character-count="2763"/>
    <meta:generator>LibreOffice/7.3.7.2$Linux_X86_64 LibreOffice_project/30$Build-2</meta:generator>
  </office:meta>
</office:document-meta>
</file>