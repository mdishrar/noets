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000000201268B1F25F0535CFD.png" manifest:media-type="image/png"/>
  <manifest:file-entry manifest:full-path="Pictures/100000010000025F000000D270A61C55634224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  <style:text-properties fo:font-size="13pt" officeooo:paragraph-rsid="001502ed" style:font-size-asian="13pt" style:font-size-complex="13pt"/>
    </style:style>
    <style:style style:name="P2" style:family="paragraph" style:parent-style-name="Heading_20_3">
      <style:paragraph-properties fo:margin-left="0cm" fo:margin-right="0cm" fo:text-indent="0cm" style:auto-text-indent="false"/>
      <style:text-properties fo:font-size="13pt" fo:font-weight="bold" officeooo:paragraph-rsid="001502ed" style:font-size-asian="13pt" style:font-weight-asian="bold" style:font-size-complex="13pt"/>
    </style:style>
    <style:style style:name="P3" style:family="paragraph" style:parent-style-name="Heading_20_1">
      <style:paragraph-properties fo:margin-left="3.256cm" fo:margin-right="0cm" fo:margin-top="0.106cm" fo:margin-bottom="0cm" style:contextual-spacing="false" fo:text-indent="0cm" style:auto-text-indent="false"/>
      <style:text-properties officeooo:paragraph-rsid="001502ed"/>
    </style:style>
    <style:style style:name="P4" style:family="paragraph" style:parent-style-name="Heading_20_1">
      <style:paragraph-properties fo:margin-left="3.256cm" fo:margin-right="0cm" fo:text-indent="0cm" style:auto-text-indent="false"/>
      <style:text-properties officeooo:paragraph-rsid="001502ed"/>
    </style:style>
    <style:style style:name="P5" style:family="paragraph" style:parent-style-name="Heading_20_1">
      <style:paragraph-properties fo:margin-left="0cm" fo:margin-right="0cm" fo:text-indent="0cm" style:auto-text-indent="false"/>
      <style:text-properties officeooo:paragraph-rsid="001502ed"/>
    </style:style>
    <style:style style:name="P6" style:family="paragraph" style:parent-style-name="Heading_20_1">
      <style:paragraph-properties fo:margin-top="0.106cm" fo:margin-bottom="0.499cm" style:contextual-spacing="false"/>
      <style:text-properties officeooo:paragraph-rsid="001502ed"/>
    </style:style>
    <style:style style:name="P7" style:family="paragraph" style:parent-style-name="Text_20_body">
      <style:text-properties officeooo:paragraph-rsid="001502ed"/>
    </style:style>
    <style:style style:name="P8" style:family="paragraph" style:parent-style-name="Heading_20_1">
      <style:paragraph-properties fo:margin-left="3.256cm" fo:margin-right="0cm" fo:margin-top="0.106cm" fo:margin-bottom="0cm" style:contextual-spacing="false" fo:text-indent="0cm" style:auto-text-indent="false"/>
      <style:text-properties fo:font-size="12pt" officeooo:rsid="0016b2cd" officeooo:paragraph-rsid="0016b2cd" style:font-size-asian="12pt" style:font-size-complex="12pt"/>
    </style:style>
    <style:style style:name="P9" style:family="paragraph" style:parent-style-name="Heading_20_1" style:master-page-name="">
      <loext:graphic-properties draw:fill="none"/>
      <style:paragraph-properties fo:margin-left="0cm" fo:margin-right="1cm" fo:margin-top="0.106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punctuation-wrap="simple" style:writing-mode="lr-tb"/>
      <style:text-properties fo:font-size="18pt" fo:font-weight="bold" officeooo:paragraph-rsid="001502ed" style:font-size-asian="18pt" style:font-weight-asian="bold" style:font-size-complex="18pt" fo:hyphenate="false" fo:hyphenation-remain-char-count="2" fo:hyphenation-push-char-count="2" loext:hyphenation-no-caps="false"/>
    </style:style>
    <style:style style:name="P10" style:family="paragraph" style:parent-style-name="Heading_20_1">
      <style:paragraph-properties fo:margin-left="0cm" fo:margin-right="0cm" fo:text-indent="0cm" style:auto-text-indent="false"/>
      <style:text-properties fo:font-size="16pt" fo:font-weight="bold" officeooo:paragraph-rsid="001502ed" style:font-size-asian="16pt" style:font-weight-asian="bold" style:font-size-complex="16pt"/>
    </style:style>
    <style:style style:name="P11" style:family="paragraph" style:parent-style-name="Text_20_body">
      <style:text-properties fo:font-size="10.5pt" fo:font-weight="bold" officeooo:rsid="0016a616" style:font-size-asian="9.14999961853027pt" style:font-weight-asian="bold" style:font-size-complex="10.5pt"/>
    </style:style>
    <style:style style:name="P12" style:family="paragraph" style:parent-style-name="Text_20_body">
      <style:text-properties officeooo:rsid="0016a616" officeooo:paragraph-rsid="0018a896"/>
    </style:style>
    <style:style style:name="P13" style:family="paragraph" style:parent-style-name="Heading_20_1" style:master-page-name="Standard">
      <style:paragraph-properties fo:margin-left="3.256cm" fo:margin-right="0cm" fo:margin-top="0.106cm" fo:margin-bottom="0cm" style:contextual-spacing="false" fo:text-indent="0cm" style:auto-text-indent="false" style:page-number="auto"/>
      <style:text-properties fo:font-size="12pt" officeooo:rsid="0016b2cd" officeooo:paragraph-rsid="0016b2cd" style:font-size-asian="12pt" style:font-size-complex="12pt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Preformatted_20_Text">
      <style:text-properties fo:font-size="13pt" fo:font-weight="bold" officeooo:rsid="0016a616" officeooo:paragraph-rsid="0018a896" style:font-size-asian="13pt" style:font-weight-asian="bold" style:font-size-complex="13pt"/>
    </style:style>
    <style:style style:name="P16" style:family="paragraph" style:parent-style-name="Preformatted_20_Text">
      <style:text-properties fo:font-size="13pt" fo:font-weight="bold" officeooo:rsid="0018a896" officeooo:paragraph-rsid="0018a896" style:font-size-asian="11.3500003814697pt" style:font-weight-asian="bold" style:font-size-complex="13pt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cm" fo:margin-bottom="0cm" style:contextual-spacing="false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paragraph-properties fo:margin-top="0cm" fo:margin-bottom="0cm" style:contextual-spacing="false"/>
    </style:style>
    <style:style style:name="P23" style:family="paragraph" style:parent-style-name="Text_20_body" style:list-style-name="L4"/>
    <style:style style:name="P24" style:family="paragraph" style:parent-style-name="Text_20_body" style:list-style-name="L4">
      <style:paragraph-properties fo:margin-top="0cm" fo:margin-bottom="0cm" style:contextual-spacing="false"/>
    </style:style>
    <style:style style:name="P25" style:family="paragraph" style:parent-style-name="Text_20_body" style:list-style-name="L5"/>
    <style:style style:name="P26" style:family="paragraph" style:parent-style-name="Text_20_body" style:list-style-name="L5">
      <style:paragraph-properties fo:margin-top="0cm" fo:margin-bottom="0cm" style:contextual-spacing="false"/>
    </style:style>
    <style:style style:name="P27" style:family="paragraph" style:parent-style-name="Text_20_body">
      <style:text-properties fo:font-size="13pt" fo:font-weight="bold" officeooo:rsid="0016a616" officeooo:paragraph-rsid="0018a896" style:font-size-asian="13pt" style:font-weight-asian="bold" style:font-size-complex="13pt"/>
    </style:style>
    <style:style style:name="P28" style:family="paragraph" style:parent-style-name="Text_20_body">
      <style:text-properties fo:font-size="13pt" fo:font-weight="bold" officeooo:rsid="0018a896" officeooo:paragraph-rsid="0018a896" style:font-size-asian="11.3500003814697pt" style:font-weight-asian="bold" style:font-size-complex="13pt"/>
    </style:style>
    <style:style style:name="P29" style:family="paragraph" style:parent-style-name="Text_20_body">
      <style:text-properties fo:font-size="13pt" fo:font-weight="bold" officeooo:rsid="001e5af2" officeooo:paragraph-rsid="001e5af2" style:font-size-asian="11.3500003814697pt" style:font-weight-asian="bold" style:font-size-complex="13pt"/>
    </style:style>
    <style:style style:name="P30" style:family="paragraph" style:parent-style-name="Text_20_body">
      <style:text-properties fo:font-size="18pt" fo:font-weight="bold" officeooo:rsid="0018a896" officeooo:paragraph-rsid="0018a896" style:font-size-asian="18pt" style:font-weight-asian="bold" style:font-size-complex="18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officeooo:rsid="001502ed"/>
    </style:style>
    <style:style style:name="T6" style:family="text">
      <style:text-properties officeooo:rsid="0018a896"/>
    </style:style>
    <style:style style:name="T7" style:family="text">
      <style:text-properties officeooo:rsid="001aa1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Name-Md Ishrar</text:h>
      <text:h text:style-name="P8" text:outline-level="2">Roll - 12019051623</text:h>
      <text:h text:style-name="P3" text:outline-level="2"/>
      <text:h text:style-name="P3" text:outline-level="2"><text:s text:c="15"/>Program <text:span text:style-name="T6">7</text:span>: </text:h>
      <text:h text:style-name="P6" text:outline-level="2"><text:span text:style-name="Strong_20_Emphasis">Build ANN using Backpropagation</text:span></text:h>
      <text:h text:style-name="P3" text:outline-level="2"/>
      <text:h text:style-name="P4" text:outline-level="2"/>
      <text:h text:style-name="P9" text:outline-level="2">Aim : </text:h>
      <text:h text:style-name="P5" text:outline-level="2"><text:span text:style-name="T2"><text:s text:c="9"/>To implement an </text:span><text:span text:style-name="Strong_20_Emphasis"><text:span text:style-name="T3">Artificial Neural Network (ANN)</text:span></text:span><text:span text:style-name="T2"> and train it using the <text:s text:c="6"/></text:span><text:span text:style-name="Strong_20_Emphasis"><text:span text:style-name="T3">Backpropagation algorithm</text:span></text:span><text:span text:style-name="T2"> to learn patterns from data.</text:span></text:h>
      <text:h text:style-name="P1" text:outline-level="2"/>
      <text:h text:style-name="P10" text:outline-level="2">Theory :</text:h>
      <text:h text:style-name="P5" text:outline-level="2"><text:span text:style-name="T4"><text:tab/></text:span><text:span text:style-name="T2">An </text:span><text:span text:style-name="Strong_20_Emphasis"><text:span text:style-name="T3">Artificial Neural Network (ANN)</text:span></text:span><text:span text:style-name="T2"> is a system of interconnected neurons organized in:</text:span></text:h>
      <text:list xml:id="list217055551" text:style-name="L1">
        <text:list-item>
          <text:p text:style-name="P18">Input layer </text:p>
        </text:list-item>
        <text:list-item>
          <text:p text:style-name="P18">Hidden layer(s) </text:p>
        </text:list-item>
        <text:list-item>
          <text:p text:style-name="P17">Output layer </text:p>
        </text:list-item>
      </text:list>
      <text:p text:style-name="Text_20_body">Each neuron performs:</text:p>
      <text:p text:style-name="P7">z=w1​x1​+w2​x2​+b</text:p>
      <text:p text:style-name="P7"><text:s/>a=σ(z) </text:p>
      <text:p text:style-name="Text_20_body">Where:</text:p>
      <text:list xml:id="list4234665406" text:style-name="L2">
        <text:list-item>
          <text:p text:style-name="P20">z → weighted sum </text:p>
        </text:list-item>
        <text:list-item>
          <text:p text:style-name="P19">a → activation output</text:p>
        </text:list-item>
      </text:list>
      <text:h text:style-name="P2" text:outline-level="3">3. What is Backpropagation?</text:h>
      <text:p text:style-name="Text_20_body">Backpropagation is a method to:</text:p>
      <text:list xml:id="list1316930076" text:style-name="L3">
        <text:list-item>
          <text:p text:style-name="P22">Calculate error </text:p>
        </text:list-item>
        <text:list-item>
          <text:p text:style-name="P22">Propagate error backward </text:p>
        </text:list-item>
        <text:list-item>
          <text:p text:style-name="P21">Update weights</text:p>
        </text:list-item>
      </text:list>
      <text:p text:style-name="Text_20_body"/>
      <text:h text:style-name="Heading_20_3" text:outline-level="3"><text:span text:style-name="T5">4</text:span>. Weight Update Rule (Gradient Descent)</text:h>
      <text:p text:style-name="Text_20_body">w=w−η∂w∂E​</text:p>
      <text:p text:style-name="Text_20_body">Where:</text:p>
      <text:list xml:id="list701543373" text:style-name="L4">
        <text:list-item>
          <text:p text:style-name="P24">η = learning rate </text:p>
        </text:list-item>
        <text:list-item>
          <text:p text:style-name="P23">∂w∂E​ = gradient </text:p>
        </text:list-item>
      </text:list>
      <text:p text:style-name="Horizontal_20_Line"><text:soft-page-break/></text:p>
      <text:h text:style-name="Heading_20_3" text:outline-level="3"><text:span text:style-name="T5">5</text:span>. Working Steps</text:h>
      <text:list xml:id="list3205106098" text:style-name="L5">
        <text:list-item>
          <text:p text:style-name="P26"><text:span text:style-name="Strong_20_Emphasis">Forward Pass</text:span> </text:p>
          <text:list>
            <text:list-item>
              <text:p text:style-name="P26">Input → Hidden → Output </text:p>
            </text:list-item>
          </text:list>
        </text:list-item>
        <text:list-item>
          <text:p text:style-name="P26"><text:span text:style-name="Strong_20_Emphasis">Compute Error</text:span> </text:p>
        </text:list-item>
        <text:list-item>
          <text:p text:style-name="P26"><text:span text:style-name="Strong_20_Emphasis">Backward Pass</text:span> </text:p>
          <text:list>
            <text:list-item>
              <text:p text:style-name="P26">Compute gradients </text:p>
            </text:list-item>
          </text:list>
        </text:list-item>
        <text:list-item>
          <text:p text:style-name="P26"><text:span text:style-name="Strong_20_Emphasis">Update Weights</text:span> </text:p>
        </text:list-item>
        <text:list-item>
          <text:p text:style-name="P25">Repeat until convergence</text:p>
        </text:list-item>
      </text:list>
      <text:p text:style-name="Text_20_body"/>
      <text:p text:style-name="P12"><text:span text:style-name="T1">Code : </text:span><text:span text:style-name="T2"><text:s text:c="8"/></text:span></text:p>
      <text:p text:style-name="P15">import numpy as np</text:p>
      <text:p text:style-name="Preformatted_20_Text">from sklearn.model_selection import train_test_split</text:p>
      <text:p text:style-name="Preformatted_20_Text"/>
      <text:p text:style-name="Preformatted_20_Text">db = np.loadtxt("../input/duke-breast-cancer.txt")</text:p>
      <text:p text:style-name="P14">print("Database raw shape (%s,%s)" % np.shape(db))</text:p>
      <text:p text:style-name="P15">np.random.shuffle(db)</text:p>
      <text:p text:style-name="Preformatted_20_Text">y = db[:, 0]</text:p>
      <text:p text:style-name="Preformatted_20_Text">x = np.delete(db, [0], axis=1)</text:p>
      <text:p text:style-name="Preformatted_20_Text">x_train, x_test, y_train, y_test = train_test_split(x, y, test_size=0.1)</text:p>
      <text:p text:style-name="P14">print(np.shape(x_train),np.shape(x_test))</text:p>
      <text:p text:style-name="P15">hidden_layer = np.zeros(72)</text:p>
      <text:p text:style-name="Preformatted_20_Text">weights = np.random.random((len(x[0]), 72))</text:p>
      <text:p text:style-name="Preformatted_20_Text">output_layer = np.zeros(2)</text:p>
      <text:p text:style-name="P14">hidden_weights = np.random.random((72, 2))</text:p>
      <text:p text:style-name="P15">def sum_function(weights, index_locked_col, x):</text:p>
      <text:p text:style-name="Preformatted_20_Text"><text:s text:c="4"/>result = 0</text:p>
      <text:p text:style-name="Preformatted_20_Text"><text:s text:c="4"/>for i in range(0, len(x)):</text:p>
      <text:p text:style-name="Preformatted_20_Text"><text:s text:c="8"/>result += x[i] * weights[i][index_locked_col]</text:p>
      <text:p text:style-name="P14"><text:s text:c="4"/>return result</text:p>
      <text:p text:style-name="P15">def activate_layer(layer, weights, x):</text:p>
      <text:p text:style-name="Preformatted_20_Text"><text:s text:c="4"/>for i in range(0, len(layer)):</text:p>
      <text:p text:style-name="P14"><text:s text:c="8"/>layer[i] = 1.7159 * np.tanh(2.0 * sum_function(weights, i, x) / 3.0)</text:p>
      <text:p text:style-name="P15">def soft_max(layer):</text:p>
      <text:p text:style-name="Preformatted_20_Text"><text:s text:c="4"/>soft_max_output_layer = np.zeros(len(layer))</text:p>
      <text:p text:style-name="Preformatted_20_Text"><text:s text:c="4"/>for i in range(0, len(layer)):</text:p>
      <text:p text:style-name="Preformatted_20_Text"><text:s text:c="8"/>denominator = 0</text:p>
      <text:p text:style-name="Preformatted_20_Text"><text:s text:c="8"/>for j in range(0, len(layer)):</text:p>
      <text:p text:style-name="Preformatted_20_Text"><text:s text:c="12"/>denominator += np.exp(layer[j] - np.max(layer))</text:p>
      <text:p text:style-name="Preformatted_20_Text"><text:s text:c="8"/>soft_max_output_layer[i] = np.exp(layer[i] - np.max(layer))/denominator</text:p>
      <text:p text:style-name="P14"><text:s text:c="4"/>return soft_max_output_layer</text:p>
      <text:p text:style-name="P27"/>
      <text:p text:style-name="P30"/>
      <text:p text:style-name="P16"><text:soft-page-break/><text:span text:style-name="T7">d</text:span>ef recalculate_weights(learning_rate, weights, gradient, activation):</text:p>
      <text:p text:style-name="Preformatted_20_Text"><text:s text:c="4"/>for i in range(0, len(weights)):</text:p>
      <text:p text:style-name="Preformatted_20_Text"><text:s text:c="8"/>for j in range(0, len(weights[i])):</text:p>
      <text:p text:style-name="P14"><text:s text:c="12"/>weights[i][j] = (learning_rate * gradient[j] * activation[i]<text:span text:style-name="T7">)</text:span>+ <text:s text:c="4"/><text:tab/><text:tab/><text:tab/><text:tab/><text:tab/><text:tab/><text:tab/><text:tab/><text:tab/><text:tab/><text:tab/>weights[i][j]</text:p>
      <text:p text:style-name="P16">def back_propagation(hidden_layer, output_layer, one_hot_encoding, learning_rate, x):</text:p>
      <text:p text:style-name="Preformatted_20_Text"><text:s text:c="4"/>output_derivative = np.zeros(2)</text:p>
      <text:p text:style-name="Preformatted_20_Text"><text:s text:c="4"/>output_gradient = np.zeros(2)</text:p>
      <text:p text:style-name="Preformatted_20_Text"><text:s text:c="4"/>for i in range(0, len(output_layer)):</text:p>
      <text:p text:style-name="Preformatted_20_Text"><text:s text:c="8"/>output_derivative[i] = (1.0 - output_layer[i]) * output_layer[i]</text:p>
      <text:p text:style-name="Preformatted_20_Text"><text:s text:c="4"/>for i in range(0, len(output_layer)):</text:p>
      <text:p text:style-name="Preformatted_20_Text"><text:s text:c="8"/>output_gradient[i] = output_derivative[i] * (one_hot_encoding[i] - output_layer[i])</text:p>
      <text:p text:style-name="Preformatted_20_Text"><text:s text:c="4"/>hidden_derivative = np.zeros(72)</text:p>
      <text:p text:style-name="Preformatted_20_Text"><text:s text:c="4"/>hidden_gradient = np.zeros(72)</text:p>
      <text:p text:style-name="Preformatted_20_Text"><text:s text:c="4"/>for i in range(0, len(hidden_layer)):</text:p>
      <text:p text:style-name="Preformatted_20_Text"><text:s text:c="8"/>hidden_derivative[i] = (1.0 - hidden_layer[i]) * (1.0 + hidden_layer[i])</text:p>
      <text:p text:style-name="Preformatted_20_Text"><text:s text:c="4"/>for i in range(0, len(hidden_layer)):</text:p>
      <text:p text:style-name="Preformatted_20_Text"><text:s text:c="8"/>sum_ = 0</text:p>
      <text:p text:style-name="Preformatted_20_Text"><text:s text:c="8"/>for j in range(0, len(output_gradient)):</text:p>
      <text:p text:style-name="Preformatted_20_Text"><text:s text:c="12"/>sum_ += output_gradient[j] * hidden_weights[i][j]</text:p>
      <text:p text:style-name="Preformatted_20_Text"><text:s text:c="8"/>hidden_gradient[i] = sum_ * hidden_derivative[i]</text:p>
      <text:p text:style-name="Preformatted_20_Text"><text:s text:c="4"/>recalculate_weights(learning_rate, hidden_weights, output_gradient, hidden_layer)</text:p>
      <text:p text:style-name="P14"><text:s text:c="4"/>recalculate_weights(learning_rate, weights, hidden_gradient, x)</text:p>
      <text:p text:style-name="P16">one_hot_encoding = np.zeros((2,2))</text:p>
      <text:p text:style-name="Preformatted_20_Text">for i in range(0, len(one_hot_encoding)):</text:p>
      <text:p text:style-name="Preformatted_20_Text"><text:s text:c="4"/>one_hot_encoding[i][i] = 1</text:p>
      <text:p text:style-name="Preformatted_20_Text">training_correct_answers = 0</text:p>
      <text:p text:style-name="Preformatted_20_Text">for i in range(0, len(x_train)):</text:p>
      <text:p text:style-name="Preformatted_20_Text"><text:s text:c="4"/>activate_layer(hidden_layer, weights, x_train[i])</text:p>
      <text:p text:style-name="Preformatted_20_Text"><text:s text:c="4"/>activate_layer(output_layer, hidden_weights, hidden_layer)</text:p>
      <text:p text:style-name="Preformatted_20_Text"><text:s text:c="4"/>output_layer = soft_max(output_layer)</text:p>
      <text:p text:style-name="Preformatted_20_Text"><text:s text:c="4"/>training_correct_answers += 1 if y_train[i] == np.argmax(output_layer) else 0</text:p>
      <text:p text:style-name="Preformatted_20_Text"><text:s text:c="4"/>back_propagation(hidden_layer, output_layer, one_hot_encoding[int(y_train[i])], -1, x_train[i])</text:p>
      <text:p text:style-name="Preformatted_20_Text">print("MLP Correct answers while learning: %s / %s (Accuracy = %s) on %s database." % (training_correct_answers, len(x_train), </text:p>
      <text:p text:style-name="P14"><text:s text:c="87"/>training_correct_answers/len(x_train),"Duke breast cancer"))</text:p>
      <text:p text:style-name="P16">testing_correct_answers = 0</text:p>
      <text:p text:style-name="Preformatted_20_Text">for i in range(0, len(x_test)):</text:p>
      <text:p text:style-name="Preformatted_20_Text"><text:s text:c="4"/>activate_layer(hidden_layer, weights, x_test[i])</text:p>
      <text:p text:style-name="Preformatted_20_Text"><text:s text:c="4"/>activate_layer(output_layer, hidden_weights, hidden_layer)</text:p>
      <text:p text:style-name="Preformatted_20_Text"><text:s text:c="4"/>output_layer = soft_max(output_layer)</text:p>
      <text:p text:style-name="Preformatted_20_Text"><text:s text:c="4"/>testing_correct_answers += 1 if y_test[i] == np.argmax(output_layer) else 0</text:p>
      <text:p text:style-name="Preformatted_20_Text">print("MLP Correct answers while testing: %s / %s (Accuracy = %s) on %s database" % (testing_correct_answers, len(x_test),</text:p>
      <text:p text:style-name="P14"><text:s/>testing_correct_answers/len(x_test), "Duke breast cancer"))</text:p>
      <text:p text:style-name="P28"/>
      <text:p text:style-name="P28"/>
      <text:p text:style-name="P29"><text:soft-page-break/>Output :</text:p>
      <text:p text:style-name="P29"><draw:frame draw:style-name="fr2" draw:name="Image1" text:anchor-type="char" svg:width="16.06cm" svg:height="5.556cm" draw:z-index="0"><draw:image xlink:href="Pictures/100000010000025F000000D270A61C5563422437.png" xlink:type="simple" xlink:show="embed" xlink:actuate="onLoad" draw:mime-type="image/png"/></draw:frame><draw:frame draw:style-name="fr1" draw:name="Image2" text:anchor-type="char" svg:x="-0.623cm" svg:y="11.289cm" svg:width="17cm" svg:height="5.988cm" draw:z-index="1"><draw:image xlink:href="Pictures/10000001000005B000000201268B1F25F0535C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2.718cm" fo:margin-right="0cm" fo:margin-top="0.106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20pt" fo:language="en" fo:country="US" fo:font-weight="bold" style:font-name-asian="Times New Roman1" style:font-family-asian="'Times New Roman'" style:font-family-generic-asian="system" style:font-pitch-asian="variable" style:font-size-asian="2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0pt" style:language-complex="ar" style:country-complex="SA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3:09:51.120876260</meta:creation-date>
    <dc:date>2026-04-13T09:26:28.358595079</dc:date>
    <meta:editing-duration>PT27M46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4" meta:paragraph-count="108" meta:word-count="476" meta:character-count="4441" meta:non-whitespace-character-count="3658"/>
  </office:meta>
</office:document-meta>
</file>